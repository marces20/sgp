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2655042696255AFAD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Narrow" svg:font-family="'Arial Narrow'" style:font-family-generic="swiss"/>
    <style:font-face style:name="Arial Black" svg:font-family="'Arial Black'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cm" style:rel-width="100%" fo:margin-top="0cm" fo:margin-bottom="0cm" table:align="center" style:writing-mode="lr-tb"/>
    </style:style>
    <style:style style:name="Tabla1.A" style:family="table-column">
      <style:table-column-properties style:column-width="2.609cm" style:rel-column-width="10053*"/>
    </style:style>
    <style:style style:name="Tabla1.B" style:family="table-column">
      <style:table-column-properties style:column-width="3.177cm" style:rel-column-width="12248*"/>
    </style:style>
    <style:style style:name="Tabla1.C" style:family="table-column">
      <style:table-column-properties style:column-width="2.611cm" style:rel-column-width="10060*"/>
    </style:style>
    <style:style style:name="Tabla1.E" style:family="table-column">
      <style:table-column-properties style:column-width="2.999cm" style:rel-column-width="11560*"/>
    </style:style>
    <style:style style:name="Tabla1.F" style:family="table-column">
      <style:table-column-properties style:column-width="2.999cm" style:rel-column-width="11558*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2" style:family="table-row">
      <style:table-row-properties style:min-row-height="0.423cm" fo:keep-together="auto"/>
    </style:style>
    <style:style style:name="Tabla1.A2" style:family="table-cell">
      <style:table-cell-properties style:vertical-align="bottom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C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C3" style:family="table-cell">
      <style:table-cell-properties style:vertical-align="bottom" fo:background-color="#ffffff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1" fo:font-size="14pt" officeooo:paragraph-rsid="00037013" style:font-name-asian="Arial Black1" style:font-size-asian="14pt" style:font-name-complex="Arial Black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1" fo:font-size="14pt" fo:font-weight="bold" officeooo:paragraph-rsid="00037013" style:font-name-asian="Arial Black1" style:font-size-asian="14pt" style:font-weight-asian="bold" style:font-name-complex="Arial Black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1" officeooo:paragraph-rsid="00037013" style:font-name-asian="Arial Black1" style:font-name-complex="Arial Black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 Black" officeooo:paragraph-rsid="00037013" style:font-name-asian="Arial Black1" style:font-name-complex="Arial Black1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37013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9pt" fo:language="es" fo:country="ES" fo:font-weight="bold" officeooo:paragraph-rsid="00037013" style:letter-kerning="false" style:font-name-asian="Times New Roman" style:font-size-asian="9pt" style:language-asian="es" style:country-asian="ES" style:font-weight-asian="bold" style:font-name-complex="Times New Roman" style:font-size-complex="9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language="es" fo:country="ES" officeooo:paragraph-rsid="00037013" style:letter-kerning="false" style:font-name-asian="Times New Roman" style:font-size-asian="8pt" style:language-asian="es" style:country-asian="ES" style:font-name-complex="Times New Roman" style:font-size-complex="8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language="es" fo:country="ES" fo:font-weight="bold" officeooo:paragraph-rsid="00037013" style:letter-kerning="false" style:font-name-asian="Times New Roman" style:font-size-asian="8pt" style:language-asian="es" style:country-asian="ES" style:font-weight-asian="bold" style:font-name-complex="Times New Roman" style:font-size-complex="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8pt" fo:language="es" fo:country="ES" officeooo:paragraph-rsid="00037013" style:letter-kerning="false" style:font-name-asian="Times New Roman" style:font-size-asian="8pt" style:language-asian="es" style:country-asian="ES" style:font-name-complex="Times New Roman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8pt" fo:language="es" fo:country="ES" fo:font-weight="bold" officeooo:paragraph-rsid="00037013" style:letter-kerning="false" style:font-name-asian="Times New Roman" style:font-size-asian="8pt" style:language-asian="es" style:country-asian="ES" style:font-weight-asian="bold" style:font-name-complex="Times New Roman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8pt" fo:language="es" fo:country="ES" fo:font-weight="bold" officeooo:rsid="00170803" officeooo:paragraph-rsid="00170803" style:letter-kerning="false" style:font-name-asian="Times New Roman" style:font-size-asian="8pt" style:language-asian="es" style:country-asian="ES" style:font-weight-asian="bold" style:font-name-complex="Times New Roman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Calibri" fo:font-size="8pt" fo:language="es" fo:country="ES" officeooo:paragraph-rsid="00037013" style:letter-kerning="false" style:font-name-asian="Times New Roman" style:font-size-asian="8pt" style:language-asian="es" style:country-asian="ES" style:font-name-complex="Times New Roman" style:font-size-complex="8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7.502cm" style:auto-text-indent="false">
        <style:tab-stops>
          <style:tab-stop style:position="7.502cm" style:type="center"/>
        </style:tab-stops>
      </style:paragraph-properties>
      <style:text-properties style:font-name="Arial Narrow" fo:font-size="12pt" fo:font-weight="normal" officeooo:paragraph-rsid="0006a6c8" style:font-name-asian="Arial Black1" style:font-size-asian="12pt" style:font-weight-asian="normal" style:font-name-complex="Arial Black1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 Black" fo:font-size="14pt" fo:font-weight="bold" officeooo:paragraph-rsid="00037013" style:font-name-asian="Arial Black1" style:font-size-asian="14pt" style:font-weight-asian="bold" style:font-name-complex="Arial Black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 Black" fo:font-size="14pt" officeooo:paragraph-rsid="00037013" style:font-name-asian="Arial Black1" style:font-size-asian="14pt" style:font-name-complex="Arial Black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 Black" fo:font-size="11pt" officeooo:paragraph-rsid="00037013" style:font-name-asian="Arial Black1" style:font-size-asian="11pt" style:font-name-complex="Arial Black1" style:font-size-complex="11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1" fo:font-size="14pt" officeooo:paragraph-rsid="00037013" style:font-name-asian="Arial Black1" style:font-size-asian="14pt" style:font-name-complex="Arial Black1" style:font-size-complex="14pt"/>
    </style:style>
    <style:style style:name="T1" style:family="text">
      <style:text-properties style:font-name="Arial Narrow1" fo:font-size="12pt" style:font-name-asian="Arial Black1" style:font-size-asian="12pt" style:font-name-complex="Arial Black1" style:font-size-complex="12pt"/>
    </style:style>
    <style:style style:name="T2" style:family="text">
      <style:text-properties style:font-name="Arial Narrow1" fo:font-size="12pt" fo:font-weight="bold" style:font-name-asian="Arial Black1" style:font-size-asian="12pt" style:font-weight-asian="bold" style:font-name-complex="Arial Black1" style:font-size-complex="12pt"/>
    </style:style>
    <style:style style:name="T3" style:family="text">
      <style:text-properties style:font-name="Arial Narrow1" fo:font-size="12pt" fo:font-weight="bold" officeooo:rsid="001f8e52" style:font-name-asian="Arial Black1" style:font-size-asian="12pt" style:font-weight-asian="bold" style:font-name-complex="Arial Black1" style:font-size-complex="12pt"/>
    </style:style>
    <style:style style:name="T4" style:family="text">
      <style:text-properties style:font-name="Arial Narrow1" fo:font-size="12pt" style:text-underline-style="solid" style:text-underline-width="auto" style:text-underline-color="font-color" fo:font-weight="bold" style:font-name-asian="Arial Black1" style:font-size-asian="12pt" style:font-weight-asian="bold" style:font-name-complex="Arial Black1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s" fo:country="AR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n1" text:anchor-type="char" svg:x="0.258cm" svg:y="-0.023cm" svg:width="2.346cm" svg:height="1.801cm" draw:z-index="0"><draw:image xlink:href="Pictures/10000000000002BB000002655042696255AFAD3A.png" xlink:type="simple" xlink:show="embed" xlink:actuate="onLoad" loext:mime-type="image/png"/></draw:frame></text:p>
      <text:p text:style-name="P16"><text:span text:style-name="T6">CERTIFICADO DE DEUDA Nº <text:s/></text:span><text:span text:style-name="T6"><text:text-input text:description="$numero">$numero</text:text-input></text:span></text:p>
      <text:p text:style-name="P17"/>
      <text:p text:style-name="P17"/>
      <text:p text:style-name="P17"><text:span text:style-name="T6">RAZON SOCIAL:</text:span> <text:text-input text:description="$cliente">$cliente</text:text-input></text:p>
      <text:p text:style-name="P17"><text:span text:style-name="T6">CUIT:</text:span> <text:text-input text:description="$cuit">$cuit</text:text-input></text:p>
      <text:p text:style-name="P17"><text:span text:style-name="T6">DIRECCION:</text:span> <text:s/><text:text-input text:description="$direccion">$direccion</text:text-input></text:p>
      <text:p text:style-name="P17"><text:span text:style-name="T6">LOCALIDAD:</text:span> <text:text-input text:description="$localidad">$localidad</text:text-input></text:p>
      <text:p text:style-name="P17"><text:span text:style-name="T6">PROVINCIA:</text:span> <text:text-input text:description="$provincia">$provincia</text:text-input></text:p>
      <text:p text:style-name="P5"/>
      <text:p text:style-name="P6"><text:span text:style-name="T1">Los que suscriben, Sra. C.P. Villarruel Vanessa en su carácter de responsable del Departamento de Tesorería; Sr. C.P. Bär Mauro en su carácter de responsable del Departamento de Contabilidad; Sr. C.P. Rehwald Hugo en su carácter de responsable del Departamento de Recupero de Gastos; Sr. C.P. Zanivan Silvia en su carácter de responsable de la Dirección de Administración, y el <text:s/>Dr. Sosa Oriel en carácter de Coordinador Clínico de Gestión Externa, del PARQUE DE LA SALUD DE LA PROVINCIA DE MISIONES DR. RAMON MADARIAGA CERTIFICAMOS, que: </text:span><text:span text:style-name="T1"><text:text-input text:description="$cliente">$cliente</text:text-input></text:span><text:span text:style-name="T2"><text:s text:c="3"/>con domicilio en </text:span><text:span text:style-name="T2"><text:text-input text:description="$direccionTotal">$direccionTotal</text:text-input></text:span><text:span text:style-name="T2">,</text:span><text:span text:style-name="T1"> adeuda a esta institución pública y descentralizada la suma de </text:span><text:span text:style-name="T2">pesos </text:span><text:span text:style-name="T1"><text:s/></text:span><text:span text:style-name="T2"><text:text-input text:description="$monto_letra">$monto_letra</text:text-input></text:span><text:span text:style-name="T2"><text:s/></text:span><text:span text:style-name="T3">(</text:span><text:span text:style-name="T4"><text:text-input text:description="$monto">$monto</text:text-input></text:span><text:span text:style-name="T2">-</text:span><text:span text:style-name="T3">)</text:span><text:span text:style-name="T1"> como deuda liquida y exigible, a la fecha de emisión del presente Certificado, en concepto de servicios médicos asistenciales prestados a los beneficiarios, afiliados, asegurados, damnificado, conforme surgen de las constancias administrativas contables obrantes en el expediente </text:span><text:span text:style-name="T2">Nº </text:span><text:span text:style-name="T2"><text:text-input text:description="$expediente">$expediente</text:text-input></text:span><text:span text:style-name="T2"><text:s/></text:span><text:span text:style-name="T1">según el siguiente detalle: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7">FECHA</text:p>
          </table:table-cell>
          <table:table-cell table:style-name="Tabla1.B1" office:value-type="string">
            <text:p text:style-name="P7">FACTURA</text:p>
          </table:table-cell>
          <table:table-cell table:style-name="Tabla1.B1" office:value-type="string">
            <text:p text:style-name="P7">MONTO</text:p>
          </table:table-cell>
          <table:table-cell table:style-name="Tabla1.B1" office:value-type="string">
            <text:p text:style-name="P7">DEBITOS</text:p>
          </table:table-cell>
          <table:table-cell table:style-name="Tabla1.B1" office:value-type="string">
            <text:p text:style-name="P7">PAGO PARCIAL</text:p>
          </table:table-cell>
          <table:table-cell table:style-name="Tabla1.B1" office:value-type="string">
            <text:p text:style-name="P7">DEUDA</text:p>
          </table:table-cell>
        </table:table-row>
        <table:table-row table:style-name="Tabla1.2">
          <table:table-cell table:style-name="Tabla1.A2" office:value-type="string">
            <text:p text:style-name="P10"><text:text-input text:description="@before-row#foreach($linea in $lineas)">@before-row#foreach($linea in $lineas)</text:text-input><text:text-input text:description="$dateUtils.formatDate($linea.recuperoFactura.fecha)">$dateUtils.formatDate($linea.recuperoFactura.fecha)</text:text-input><text:text-input text:description="@after-row#end">@after-row#end</text:text-input></text:p>
          </table:table-cell>
          <table:table-cell table:style-name="Tabla1.B2" office:value-type="string">
            <text:p text:style-name="P8"><text:text-input text:description="$linea.recuperoFactura.getNumeroFactura()">$linea.recuperoFactura.getNumeroFactura()</text:text-input></text:p>
          </table:table-cell>
          <table:table-cell table:style-name="Tabla1.C2" office:value-type="string">
            <text:p text:style-name="P10"><text:text-input text:description="$numberUtils.moneda($linea.recuperoFactura.getBase())">$numberUtils.moneda($linea.recuperoFactura.getBase())</text:text-input></text:p>
          </table:table-cell>
          <table:table-cell table:style-name="Tabla1.C2" office:value-type="string">
            <text:p text:style-name="P13"/>
          </table:table-cell>
          <table:table-cell table:style-name="Tabla1.C2" office:value-type="string">
            <text:p text:style-name="P8"><text:text-input text:description="$numberUtils.moneda($linea.recuperoFactura.getPagado())">$numberUtils.moneda($linea.recuperoFactura.getPagado())</text:text-input></text:p>
          </table:table-cell>
          <table:table-cell table:style-name="Tabla1.C2" office:value-type="string">
            <text:p text:style-name="P10"><text:text-input text:description="$numberUtils.moneda($linea.deuda)">$numberUtils.moneda($linea.deuda)</text:text-input></text:p>
          </table:table-cell>
        </table:table-row>
        <table:table-row table:style-name="Tabla1.2">
          <table:table-cell table:style-name="Tabla1.A3" table:number-columns-spanned="2" office:value-type="string">
            <text:p text:style-name="P9">TOTAL </text:p>
          </table:table-cell>
          <table:covered-table-cell/>
          <table:table-cell table:style-name="Tabla1.C3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  <table:table-cell table:style-name="Tabla1.C2" office:value-type="string">
            <text:p text:style-name="P12"><text:text-input text:description="$monto">$monto</text:text-input></text:p>
          </table:table-cell>
        </table:table-row>
      </table:table>
      <text:p text:style-name="P3"/>
      <text:p text:style-name="P2"><text:span text:style-name="T5">SON PESOS: </text:span><text:span text:style-name="T5"><text:text-input text:description="$monto_letra">$monto_letra</text:text-input></text:span><text:span text:style-name="T5">-</text:span></text:p>
      <text:p text:style-name="P4">El presente CERTIFICADO consta de una <text:s/>foja. Y tiene el carácter de TITULO EJECUTIVO conforme Artículo 16º, de la Ley VII – Nº 103º, revistiendo de suficiente título ejecutivo en el marco de lo dispuesto por el artículo 489 de la Ley XII - N.° 27 Código Procesal Civil, Comercial, de Familia y Violencia Familiar de la Provincia de Misiones Hallándose el deudor obligado al pago, por normativas mencionadas anteriormente. -</text:p>
      <text:p text:style-name="P14"><text:span text:style-name="T7">Se expide el presente Certificado en la ciudad de Posadas Provincia de Misiones, a los </text:span><text:span text:style-name="T7"><text:text-input text:description="$fechaStr">$fechaStr</text:text-input></text:span><text:span text:style-name="T7"><text:s/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Narrow" svg:font-family="'Arial Narrow'" style:font-family-generic="swiss"/>
    <style:font-face style:name="Arial Black" svg:font-family="'Arial Black'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1T13:05:19.401842497</meta:creation-date>
    <dc:date>2026-06-11T12:44:50.775330677</dc:date>
    <meta:editing-duration>PT3H9M14S</meta:editing-duration>
    <meta:editing-cycles>20</meta:editing-cycles>
    <meta:generator>LibreOffice/6.4.7.2$Linux_X86_64 LibreOffice_project/40$Build-2</meta:generator>
    <meta:document-statistic meta:table-count="1" meta:image-count="1" meta:object-count="0" meta:page-count="1" meta:paragraph-count="24" meta:word-count="318" meta:character-count="2057" meta:non-whitespace-character-count="1801"/>
  </office:meta>
</office:document-meta>
</file>